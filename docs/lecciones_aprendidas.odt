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nux_Libertine_G_4.ttf" manifest:media-type="application/x-font-ttf"/>
  <manifest:file-entry manifest:full-path="Fonts/Font_Linux_Libertine_G_3.ttf" manifest:media-type="application/x-font-ttf"/>
  <manifest:file-entry manifest:full-path="Fonts/Font_Linux_Libertine_G_2.ttf" manifest:media-type="application/x-font-ttf"/>
  <manifest:file-entry manifest:full-path="Fonts/Font_Linux_Libertine_G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Pictures/10000001000002580000013B4AA7F5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in" fo:margin-right="0in" fo:margin-top="0.0598in" fo:margin-bottom="0.0598in" style:contextual-spacing="false" fo:line-height="100%"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margin-left="0in" fo:margin-right="0in" fo:margin-top="0.0598in" fo:margin-bottom="0.0598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margin-left="0in" fo:margin-right="0in" fo:margin-top="0.0598in" fo:margin-bottom="0.0598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24pt" fo:font-style="normal" style:text-underline-style="none" fo:font-weight="bold" style:font-name-asian="Times New Roman1" style:font-size-asian="24pt" style:font-style-asian="normal" style:font-weight-asian="bold" style:font-name-complex="Times New Roman1" style:font-size-complex="24pt" style:font-style-complex="normal" style:font-weight-complex="bold"/>
    </style:style>
    <style:style style:name="P4" style:family="paragraph" style:parent-style-name="Standard">
      <style:paragraph-properties fo:margin-left="0in" fo:margin-right="0in" fo:margin-top="0.0598in" fo:margin-bottom="0.0598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P5" style:family="paragraph" style:parent-style-name="Standard">
      <style:paragraph-properties fo:margin-left="0in" fo:margin-right="0in" fo:margin-top="0.0598in" fo:margin-bottom="0.0598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P6" style:family="paragraph" style:parent-style-name="Standard">
      <style:paragraph-properties fo:margin-left="0in" fo:margin-right="0in" fo:margin-top="0.0598in" fo:margin-bottom="0.0598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26pt" fo:font-style="normal" style:text-underline-style="none" fo:font-weight="bold" style:font-name-asian="Times New Roman1" style:font-size-asian="26pt" style:font-style-asian="normal" style:font-weight-asian="bold" style:font-name-complex="Times New Roman1" style:font-size-complex="26pt" style:font-style-complex="normal" style:font-weight-complex="bold"/>
    </style:style>
    <style:style style:name="P7" style:family="paragraph" style:parent-style-name="Standard">
      <style:paragraph-properties fo:margin-left="0in" fo:margin-right="0in" fo:margin-top="0.0598in" fo:margin-bottom="0.0598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in" fo:margin-right="0in" fo:margin-top="0.0598in" fo:margin-bottom="0.0598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9" style:family="paragraph" style:parent-style-name="Heading_20_1" style:list-style-name="WWNum1">
      <style:paragraph-properties fo:margin-left="0in" fo:margin-right="0in" fo:text-indent="0in" style:auto-text-indent="false" fo:break-before="page">
        <style:tab-stops>
          <style:tab-stop style:position="0in"/>
        </style:tab-stops>
      </style:paragraph-properties>
      <style:text-properties style:font-name="Times New Roman" fo:font-style="normal" style:font-name-asian="Times New Roman1" style:font-style-asian="normal" style:font-name-complex="Times New Roman1" style:font-style-complex="normal"/>
    </style:style>
    <style:style style:name="P10" style:family="paragraph" style:parent-style-name="Heading_20_2" style:list-style-name="WWNum1">
      <style:paragraph-properties fo:margin-left="0in" fo:margin-right="0in" fo:text-indent="0in" style:auto-text-indent="false">
        <style:tab-stops>
          <style:tab-stop style:position="0in"/>
        </style:tab-stops>
      </style:paragraph-properties>
      <style:text-properties style:font-name="Times New Roman" fo:font-style="normal" style:font-name-asian="Times New Roman1" style:font-style-asian="normal" style:font-name-complex="Times New Roman1" style:font-style-complex="normal"/>
    </style:style>
    <style:style style:name="P11" style:family="paragraph" style:parent-style-name="Standard">
      <style:paragraph-properties fo:margin-left="0in" fo:margin-right="0in" fo:margin-top="0.0598in" fo:margin-bottom="0.0598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T1" style:family="text">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4" style:family="text">
      <style:text-properties officeooo:rsid="0007d9e1"/>
    </style:style>
    <style:style style:name="T5" style:family="text">
      <style:text-properties officeooo:rsid="00099d3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char" svg:x="1.8in" svg:y="-0.161in" svg:width="2.678in" svg:height="1.4063in" draw:z-index="0"><draw:image xlink:href="Pictures/10000001000002580000013B4AA7F5FA.png" xlink:type="simple" xlink:show="embed" xlink:actuate="onLoad" draw:mime-type="image/png"/></draw:frame></text:p>
      <text:p text:style-name="P2"/>
      <text:p text:style-name="P2"/>
      <text:p text:style-name="P2"/>
      <text:p text:style-name="P2"/>
      <text:p text:style-name="P2"/>
      <text:p text:style-name="P3">Instituto Tecnológico de Costa Rica</text:p>
      <text:p text:style-name="P4">Escuela de Ingeniería en Computación</text:p>
      <text:p text:style-name="P5"/>
      <text:p text:style-name="P6">GenLen</text:p>
      <text:p text:style-name="P5"/>
      <text:p text:style-name="P7"><text:span text:style-name="T1">Curso</text:span><text:span text:style-name="T2">: Compiladores e Intérpretes</text:span></text:p>
      <text:p text:style-name="P7"><text:span text:style-name="T1">Profesor</text:span><text:span text:style-name="T2">: Aurelio Sanabria</text:span></text:p>
      <text:p text:style-name="P5"/>
      <text:p text:style-name="P5"/>
      <text:p text:style-name="P7"><text:span text:style-name="T1">Integrantes</text:span><text:span text:style-name="T2">:</text:span></text:p>
      <text:p text:style-name="P7"><text:span text:style-name="T2"><text:line-break/></text:span><text:span text:style-name="T3">Allan Bolaños Barrientos <text:tab/>2024145458 </text:span></text:p>
      <text:p text:style-name="P8">Brian Ramírez Arias<text:tab/><text:tab/>2024109557 </text:p>
      <text:p text:style-name="P8">Alejandro Umaña Miranda<text:tab/>2024130345 </text:p>
      <text:p text:style-name="P8">Santiago Valverde Álvarez<text:tab/>2024115742 </text:p>
      <text:p text:style-name="P8">Daniel Zeas Brown<text:tab/><text:tab/>2023147474</text:p>
      <text:p text:style-name="P8"/>
      <text:p text:style-name="P8">I Semestre 2026<text:bookmark text:name="b13tul6q5jb6"/></text:p>
      <text:list text:style-name="WWNum1">
        <text:list-item>
          <text:p text:style-name="P9">Lecciones Aprendidas<text:bookmark text:name="2pis7ibg97r2"/></text:p>
          <text:list>
            <text:list-item>
              <text:p text:style-name="P10">Allan Bolaños</text:p>
            </text:list-item>
          </text:list>
        </text:list-item>
      </text:list>
      <text:p text:style-name="P11">Trabajar con el analizador me ayudó a aterrizar varias cosas que en teoría sonaban más simples de lo que realmente fueron. Pasar de la gramática al código del parser implicó revisar varias veces reglas, porque al inicio no siempre era tan obvio cuándo algo era una asignación, una llamada a protocolo o una cadena de mecanismos. También terminé entendiendo mejor por qué en un parser LL(1) sí importa factorizar bien la gramática y evitar ciertas formas que en papel se ven normales, pero en implementación se vuelven incómodas.<text:bookmark text:name="wif1nlqgfrqy"/></text:p>
      <text:list text:continue-numbering="true" text:style-name="WWNum1">
        <text:list-item>
          <text:list>
            <text:list-item>
              <text:p text:style-name="P10">Brian Ramírez</text:p>
            </text:list-item>
          </text:list>
        </text:list-item>
      </text:list>
      <text:p text:style-name="Standard"><text:bookmark text:name="62vmg9mp9zsq"/><text:span text:style-name="T4">Durante la implementación</text:span> <text:span text:style-name="T4">d</text:span>el analizador, logré conectar la teoría con la práctica y finalmente comprendí cómo el Árbol de Sintaxis Abstracta representa realmente un programa. Antes me costaba visualizar esta relación, pero al ver el proceso de convertir el código en una estructura simplificada cuando se elimina elementos sintácticos innecesario entendí su lógica. Además, aunque trabajamos con nodos genéricos, comprendí por qué utilizar nodos personalizados sería más provechoso pues convertirían al ASA en una estructura autodescriptiva, facilitando enormemente las etapas posteriores de análisis al darle un sentido semántico claro a cada parte del árbol.</text:p>
      <text:list text:continue-numbering="true" text:style-name="WWNum1">
        <text:list-item>
          <text:list>
            <text:list-item>
              <text:p text:style-name="P10">Alejandro Umaña</text:p>
            </text:list-item>
          </text:list>
        </text:list-item>
      </text:list>
      <text:p text:style-name="Standard">Revisar la gramática LL(1) y llevarla a funciones de descenso recursivo me hizo ver que una gramática no sirve de mucho si no está pensada para implementarse de verdad. Hubo partes donde tocó devolvernos y ajustar la forma de algunas reglas para que el parser no quedara ambiguo o difícil de mantener, sobre todo en llamadas, expresiones y precedencia. Lo que más me quedó es que la gramática sí termina siendo el contrato entre etapas, pero ese contrato normalmente se corrige varias veces antes de quedar bien.<text:bookmark text:name="vgbca0jgae2u"/></text:p>
      <text:list text:continue-numbering="true" text:style-name="WWNum1">
        <text:list-item>
          <text:list>
            <text:list-item>
              <text:p text:style-name="P10">Santiago Valverde</text:p>
            </text:list-item>
          </text:list>
        </text:list-item>
      </text:list>
      <text:p text:style-name="Standard">Integrar el explorador con el analizador me ayudó a entender mejor dónde termina una etapa y empieza la otra. Antes lo veía más separado en teoría, pero al conectar todo en el main sí se notó por qué no tiene sentido que el parser corra si ya hubo errores léxicos, y también por qué aun así conviene que el analizador tenga cierta recuperación para no morirse en el primer problema. Aprendí que, en la práctica, mensajes de error claros y un AS<text:span text:style-name="T5">A</text:span> aunque sea parcial pueden <text:soft-page-break/>ahorrar bastante tiempo cuando uno está depurando.<text:bookmark text:name="hg50gg2s1fnw"/></text:p>
      <text:list text:continue-numbering="true" text:style-name="WWNum1">
        <text:list-item>
          <text:list>
            <text:list-item>
              <text:p text:style-name="P10">Daniel Zeas</text:p>
            </text:list-item>
          </text:list>
        </text:list-item>
      </text:list>
      <text:p text:style-name="Standard">Diseñar el AS<text:span text:style-name="T5">A</text:span> y luego usarlo para cosas como la función esa de doblar_constantes me hizo ver que el analizador no solo se trata de aceptar o rechazar entradas. También hay que pensar si la estructura que uno genera después realmente sirve para imprimir, probar y eventualmente seguir construyendo encima. Al inicio varias decisiones sobre qué nodos dejar y cuáles no parecían menores, pero luego se notó que sí afectan bastante la claridad del árbol y de las pruebas. Me quedó también la idea de que una salida entendible y un repositorio ordenado ayudan más de lo que uno cree cuando toca revisar o explicar el <text:span text:style-name="T5">analizador</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Heading_20_5" style:display-name="Heading 5"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font-weight-complex="bold"/>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date>2026-05-05T23:14:18.713649923</dc:date>
    <meta:editing-duration>PT1M53S</meta:editing-duration>
    <meta:editing-cycles>3</meta:editing-cycles>
    <meta:document-statistic meta:table-count="0" meta:image-count="1" meta:object-count="0" meta:page-count="3" meta:paragraph-count="23" meta:word-count="523" meta:character-count="3276" meta:non-whitespace-character-count="2762"/>
  </office:meta>
</office:document-meta>
</file>
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3B79009EAFC7654FC8.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598in" fo:margin-bottom="0.0598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margin-left="0in" fo:margin-right="0in" fo:margin-top="0.0598in" fo:margin-bottom="0.0598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P3" style:family="paragraph" style:parent-style-name="Standard">
      <style:paragraph-properties fo:margin-left="0in" fo:margin-right="0in" fo:margin-top="0.0598in" fo:margin-bottom="0.0598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in" fo:margin-right="0in" fo:margin-top="0.0598in" fo:margin-bottom="0.0598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0598in" fo:margin-bottom="0.0598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master-page-name="Standard">
      <style:paragraph-properties fo:margin-left="0in" fo:margin-right="0in" fo:margin-top="0.0598in" fo:margin-bottom="0.0598in" loext:contextual-spacing="false" fo:line-height="100%"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Heading_20_2" style:list-style-name="WWNum1">
      <style:paragraph-properties fo:margin-left="0in" fo:margin-right="0in" fo:text-indent="0in" style:auto-text-indent="false">
        <style:tab-stops>
          <style:tab-stop style:position="0in"/>
        </style:tab-stops>
      </style:paragraph-properties>
    </style:style>
    <style:style style:name="P8" style:family="paragraph" style:parent-style-name="Heading_20_1" style:list-style-name="WWNum1">
      <style:paragraph-properties fo:margin-left="0in" fo:margin-right="0in" fo:text-indent="0in" style:auto-text-indent="false" fo:break-before="page">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24pt" fo:font-style="normal" style:text-underline-style="none" fo:font-weight="bold" style:font-name-asian="Times New Roman1" style:font-size-asian="24pt" style:font-style-asian="normal" style:font-weight-asian="bold" style:font-name-complex="Times New Roman1"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26pt" fo:font-style="normal" style:text-underline-style="none" fo:font-weight="bold" style:font-name-asian="Times New Roman1" style:font-size-asian="26pt" style:font-style-asian="normal" style:font-weight-asian="bold" style:font-name-complex="Times New Roman1" style:font-size-complex="26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7" style:family="text">
      <style:text-properties style:font-name="Times New Roman" fo:font-style="normal" style:font-name-asian="Times New Roman1" style:font-style-asian="normal" style:font-name-complex="Times New Roman1" style:font-style-complex="normal"/>
    </style:style>
    <style:style style:name="T8"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png" text:anchor-type="char" svg:x="1.8in" svg:y="-0.161in" svg:width="2.678in" svg:height="1.4063in" draw:z-index="0"><draw:image xlink:href="Pictures/10000201000002580000013B79009EAFC7654FC8.png" xlink:type="simple" xlink:show="embed" xlink:actuate="onLoad" loext:mime-type="image/png"/></draw:frame></text:p>
      <text:p text:style-name="P1"/>
      <text:p text:style-name="P1"/>
      <text:p text:style-name="P1"/>
      <text:p text:style-name="P1"/>
      <text:p text:style-name="P1"/>
      <text:p text:style-name="P4"><text:span text:style-name="T1">Instituto Tecnológico de Costa Rica</text:span></text:p>
      <text:p text:style-name="P4"><text:span text:style-name="T2">Escuela de Ingeniería en Computación</text:span></text:p>
      <text:p text:style-name="P2"/>
      <text:p text:style-name="P4"><text:span text:style-name="T3">GenLen</text:span></text:p>
      <text:p text:style-name="P2"/>
      <text:p text:style-name="P4"><text:span text:style-name="T4">Curso</text:span><text:span text:style-name="T5">: Compiladores e Intérpretes</text:span></text:p>
      <text:p text:style-name="P4"><text:span text:style-name="T4">Profesor</text:span><text:span text:style-name="T5">: Aurelio Sanabria</text:span></text:p>
      <text:p text:style-name="P2"/>
      <text:p text:style-name="P2"/>
      <text:p text:style-name="P4"><text:span text:style-name="T4">Integrantes</text:span><text:span text:style-name="T5">:</text:span></text:p>
      <text:p text:style-name="P4"><text:span text:style-name="T5"><text:line-break/></text:span><text:span text:style-name="T6">Allan Bolaños Barrientos <text:tab/>2024145458 </text:span></text:p>
      <text:p text:style-name="P4"><text:span text:style-name="T6">Brian Ramírez Arias<text:tab/><text:tab/>2024109557 </text:span></text:p>
      <text:p text:style-name="P4"><text:span text:style-name="T6">Alejandro Umaña Miranda<text:tab/>2024130345 </text:span></text:p>
      <text:p text:style-name="P4"><text:span text:style-name="T6">Santiago Valverde Álvarez<text:tab/>2024115742 </text:span></text:p>
      <text:p text:style-name="P4"><text:span text:style-name="T6">Daniel Zeas Brown<text:tab/><text:tab/>2023147474</text:span></text:p>
      <text:p text:style-name="P3"/>
      <text:p text:style-name="P4"><text:span text:style-name="T6">I Semestre 2026</text:span><text:bookmark text:name="b13tul6q5jb6"/></text:p>
      <text:list xml:id="list2980820099" text:style-name="WWNum1">
        <text:list-item>
          <text:p text:style-name="P8"><text:span text:style-name="T7">Lecciones Aprendidas</text:span><text:bookmark text:name="2pis7ibg97r2"/></text:p>
          <text:list>
            <text:list-item>
              <text:p text:style-name="P7"><text:span text:style-name="T7">Allan Bolaños</text:span></text:p>
            </text:list-item>
          </text:list>
        </text:list-item>
      </text:list>
      <text:p text:style-name="P5">Trabajar con el analizador me ayudó a aterrizar varias cosas que en teoría sonaban más simples de lo que realmente fueron. Pasar de la gramática al código del parser implicó revisar varias veces reglas, porque al inicio no siempre era tan obvio cuándo algo era una asignación, una llamada a protocolo o una cadena de mecanismos. También terminé entendiendo mejor por qué en un parser LL(1) sí importa factorizar bien la gramática y evitar ciertas formas que en papel se ven normales, pero en implementación se vuelven incómodas.<text:bookmark text:name="wif1nlqgfrqy"/></text:p>
      <text:list xml:id="list220856067454101" text:continue-numbering="true" text:style-name="WWNum1">
        <text:list-item>
          <text:list>
            <text:list-item>
              <text:p text:style-name="P7"><text:span text:style-name="T7">Brian Ramírez</text:span></text:p>
            </text:list-item>
          </text:list>
        </text:list-item>
      </text:list>
      <text:p text:style-name="Standard">La parte que más me dejó fue ver que un analizador puede parecer correcto mientras solo se prueba con casos pequeños. Cuando empezaron a entrar más pruebas y ejemplos grandes, aparecieron detalles con precedencia, llamadas encadenadas y recuperación de errores que no se notaban al principio. Eso me enseñó que probar el parser con variedad de entradas vale mucho más que solo confirmar que parsea los ejemplos más bonitos. También entendí que los errores sintácticos bien reportados ayudan casi tanto como los casos exitosos.<text:bookmark text:name="62vmg9mp9zsq"/></text:p>
      <text:list xml:id="list220856018859479" text:continue-numbering="true" text:style-name="WWNum1">
        <text:list-item>
          <text:list>
            <text:list-item>
              <text:p text:style-name="P7"><text:span text:style-name="T7">Alejandro Umaña</text:span></text:p>
            </text:list-item>
          </text:list>
        </text:list-item>
      </text:list>
      <text:p text:style-name="Standard">Revisar la gramática LL(1) y llevarla a funciones de descenso recursivo me hizo ver que una gramática no sirve de mucho si no está pensada para implementarse de verdad. Hubo partes donde tocó devolvernos y ajustar la forma de algunas reglas para que el parser no quedara ambiguo o difícil de mantener, sobre todo en llamadas, expresiones y precedencia. Lo que más me quedó es que la gramática sí termina siendo el contrato entre etapas, pero ese contrato normalmente se corrige varias veces antes de quedar bien.<text:bookmark text:name="vgbca0jgae2u"/></text:p>
      <text:list xml:id="list220855442997853" text:continue-numbering="true" text:style-name="WWNum1">
        <text:list-item>
          <text:list>
            <text:list-item>
              <text:p text:style-name="P7"><text:span text:style-name="T7">Santiago Valverde</text:span></text:p>
            </text:list-item>
          </text:list>
        </text:list-item>
      </text:list>
      <text:p text:style-name="Standard">Integrar el explorador con el analizador me ayudó a entender mejor dónde termina una etapa y empieza la otra. Antes lo veía más separado en teoría, pero al conectar todo en el main sí se notó por qué no tiene sentido que el parser corra si ya hubo errores léxicos, y también por qué aun así conviene que el analizador tenga cierta recuperación para no morirse en el primer problema. Aprendí que, en la práctica, mensajes de error claros y un AST aunque sea parcial pueden ahorrar bastante tiempo cuando uno está depurando.<text:bookmark text:name="hg50gg2s1fnw"/></text:p>
      <text:list xml:id="list220855850825452" text:continue-numbering="true" text:style-name="WWNum1">
        <text:list-item>
          <text:list>
            <text:list-item>
              <text:p text:style-name="P7"><text:span text:style-name="T7">Daniel Zeas</text:span></text:p>
            </text:list-item>
          </text:list>
        </text:list-item>
      </text:list>
      <text:p text:style-name="Standard">Diseñar el AST y luego usarlo para cosas como la función esa de doblar_constantes me hizo ver que el analizador no solo se trata de aceptar o rechazar entradas. También hay que pensar si la estructura que uno genera después realmente sirve para imprimir, probar y eventualmente seguir construyendo encima. Al inicio varias decisiones sobre qué nodos dejar y cuáles no parecían menores, pero luego se notó que sí afectan bastante la claridad del árbol y de las pruebas. Me quedó también la idea de que una salida entendible y un repositorio ordenado ayudan más de lo que uno cree cuando toca revisar o explicar el pars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3" meta:word-count="513" meta:character-count="3137" meta:non-whitespace-character-count="2633"/>
    <meta:generator>LibreOfficeDev/6.0.5.2$Linux_X86_64 LibreOffice_project/</meta:generator>
  </office:meta>
</office:document-meta>
</file>
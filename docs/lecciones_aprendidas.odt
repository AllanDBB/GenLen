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580000013B4AA7F5F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style:font-name="Times New Roman" fo:font-style="normal" style:font-style-asian="normal" style:font-style-complex="normal"/>
    </style:style>
    <style:style style:name="P2" style:family="paragraph" style:parent-style-name="Text_20_body">
      <style:paragraph-properties fo:text-align="center" style:justify-single-word="false"/>
      <style:text-properties style:font-name="Times New Roman" fo:font-size="24pt" fo:font-style="normal" fo:font-weight="bold" officeooo:rsid="001dec52" officeooo:paragraph-rsid="001dec52" style:font-size-asian="24pt" style:font-style-asian="normal" style:font-weight-asian="bold" style:font-size-complex="24pt" style:font-style-complex="normal" style:font-weight-complex="bold"/>
    </style:style>
    <style:style style:name="P3" style:family="paragraph" style:parent-style-name="Text_20_body">
      <style:paragraph-properties fo:text-align="center" style:justify-single-word="false"/>
      <style:text-properties style:font-name="Times New Roman" fo:font-size="18pt" fo:font-style="normal" fo:font-weight="normal" officeooo:rsid="001dec52" officeooo:paragraph-rsid="001dec52" style:font-size-asian="18pt" style:font-style-asian="normal" style:font-weight-asian="normal" style:font-size-complex="18pt" style:font-style-complex="normal" style:font-weight-complex="normal"/>
    </style:style>
    <style:style style:name="P4" style:family="paragraph" style:parent-style-name="Text_20_body">
      <style:paragraph-properties fo:text-align="center" style:justify-single-word="false"/>
      <style:text-properties style:font-name="Times New Roman" fo:font-size="16pt" fo:font-style="normal" officeooo:rsid="001dec52" officeooo:paragraph-rsid="001dec52" style:font-size-asian="16pt" style:font-style-asian="normal" style:font-size-complex="16pt" style:font-style-complex="normal"/>
    </style:style>
    <style:style style:name="P5" style:family="paragraph" style:parent-style-name="Text_20_body">
      <style:paragraph-properties fo:text-align="center" style:justify-single-word="false"/>
      <style:text-properties style:font-name="Times New Roman" fo:font-size="26pt" fo:font-style="normal" fo:font-weight="bold" officeooo:rsid="001dec52" officeooo:paragraph-rsid="001dec52" style:font-size-asian="26pt" style:font-style-asian="normal" style:font-weight-asian="bold" style:font-size-complex="26pt" style:font-style-complex="normal" style:font-weight-complex="bold"/>
    </style:style>
    <style:style style:name="P6" style:family="paragraph" style:parent-style-name="Text_20_body">
      <style:paragraph-properties fo:text-align="center" style:justify-single-word="false"/>
      <style:text-properties style:font-name="Times New Roman" fo:font-size="14pt" fo:font-style="normal" officeooo:rsid="001dec52" officeooo:paragraph-rsid="001dec52" style:font-size-asian="14pt" style:font-style-asian="normal" style:font-size-complex="14pt" style:font-style-complex="normal"/>
    </style:style>
    <style:style style:name="P7" style:family="paragraph" style:parent-style-name="Heading_20_1">
      <style:paragraph-properties fo:break-before="page"/>
      <style:text-properties style:font-name="Times New Roman" fo:font-style="normal" style:font-style-asian="normal" style:font-style-complex="normal"/>
    </style:style>
    <style:style style:name="P8" style:family="paragraph" style:parent-style-name="Heading_20_2">
      <style:text-properties style:font-name="Times New Roman" fo:font-style="normal" style:font-style-asian="normal" style:font-style-complex="normal"/>
    </style:style>
    <style:style style:name="P9" style:family="paragraph" style:parent-style-name="First_20_paragraph">
      <style:text-properties style:font-name="Times New Roman" fo:font-style="normal" style:font-style-asian="normal" style:font-style-complex="normal"/>
    </style:style>
    <style:style style:name="T1" style:family="text">
      <style:text-properties fo:font-weight="bold" style:font-weight-asian="bold" style:font-weight-complex="bold"/>
    </style:style>
    <style:style style:name="T2" style:family="text">
      <style:text-properties fo:font-size="14pt" style:font-size-asian="14pt" style:font-size-complex="14pt"/>
    </style:style>
    <style:style style:name="T3" style:family="text">
      <style:text-properties style:font-name="Times New Roman" fo:font-style="normal" style:font-style-asian="normal" style:font-style-complex="normal"/>
    </style:style>
    <style:style style:name="T4" style:family="text">
      <style:text-properties style:font-name="Times New Roman" fo:font-style="normal" officeooo:rsid="001f8037"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x="1.8in" svg:y="-0.161in" svg:width="2.678in" svg:height="1.4063in" draw:z-index="0"><draw:image xlink:href="Pictures/10000001000002580000013B4AA7F5FA.png" xlink:type="simple" xlink:show="embed" xlink:actuate="onLoad" draw:mime-type="image/png"/></draw:frame></text:p>
      <text:p text:style-name="P1"/>
      <text:p text:style-name="P1"/>
      <text:p text:style-name="P1"/>
      <text:p text:style-name="P1"/>
      <text:p text:style-name="P1"/>
      <text:p text:style-name="P2">Instituto Tecnológico de Costa Rica</text:p>
      <text:p text:style-name="P3">Escuela de Ingeniería en Computación</text:p>
      <text:p text:style-name="P4"/>
      <text:p text:style-name="P5">GenLen</text:p>
      <text:p text:style-name="P4"/>
      <text:p text:style-name="P4"><text:span text:style-name="T1">Curso</text:span>: Compiladores e Intérpretes</text:p>
      <text:p text:style-name="P4"><text:span text:style-name="T1">Profesor</text:span>: Aurelio Sanabria</text:p>
      <text:p text:style-name="P4"/>
      <text:p text:style-name="P4"/>
      <text:p text:style-name="P4"><text:span text:style-name="T1">Integrantes</text:span>:</text:p>
      <text:p text:style-name="P4"><text:line-break/><text:span text:style-name="T2">Allan Bolaños Barrientos <text:tab/>2024145458 </text:span></text:p>
      <text:p text:style-name="P6">Brian Ramírez Arias<text:tab/><text:tab/>2024109557 </text:p>
      <text:p text:style-name="P6">Alejandro Umaña Miranda<text:tab/>2024130345 </text:p>
      <text:p text:style-name="P6">Santiago Valverde Álvarez<text:tab/>2024115742 </text:p>
      <text:p text:style-name="P6">Daniel Zeas Brown<text:tab/><text:tab/>2023147474</text:p>
      <text:p text:style-name="P6"/>
      <text:p text:style-name="P6">I Semestre 2026</text:p>
      <text:h text:style-name="P7" text:outline-level="1"><text:bookmark-start text:name="lecciones-aprendidas"/>Lecciones Aprendidas<text:bookmark-end text:name="lecciones-aprendidas"/></text:h>
      <text:h text:style-name="P8" text:outline-level="2"><text:bookmark-start text:name="allan-bolaños-barrientos"/>Allan Bolaños<text:bookmark-end text:name="allan-bolaños-barrientos"/></text:h>
      <text:p text:style-name="First_20_paragraph"><text:span text:style-name="T3">Implementar el explorador me dejó claro que la teoría de autómatas y expresiones regulares no es solo para el examen. Manejar la posición línea/columna, discriminar entre </text:span><text:span text:style-name="Source_20_Text"><text:span text:style-name="T3">-&gt;</text:span></text:span><text:span text:style-name="T3"> y </text:span><text:span text:style-name="Source_20_Text"><text:span text:style-name="T3">-</text:span></text:span><text:span text:style-name="T3"> y </text:span><text:span text:style-name="Source_20_Text"><text:span text:style-name="T3">&gt;</text:span></text:span><text:span text:style-name="T3">, y validar cadenas genéticas según contexto fueron problemas reales que requirieron pensar en cada detalle. También aprendí que los comentarios y espacios en blanco son más molestos de lo que parecen.</text:span></text:p>
      <text:h text:style-name="P8" text:outline-level="2"><text:bookmark-start text:name="brian-ramírez-arias"/>Brian Ramírez<text:bookmark-end text:name="brian-ramírez-arias"/></text:h>
      <text:p text:style-name="P9">Al implementar el analizador, logré conectar la teoría con la práctica y finalmente comprendí cómo el Árbol de Sintaxis Abstracta representa realmente un programa. Antes me costaba visualizar esta relación, pero al ver el proceso de convertir el código en una estructura simplificada cuando se elimina elementos sintácticos innecesario entendí su lógica. Además, aunque trabajamos con nodos genéricos, comprendí por qué utilizar nodos personalizados sería más provechoso pues convertirían al ASA en una estructura autodescriptiva, facilitando enormemente las etapas posteriores de análisis al darle un sentido semántico claro a cada parte del árbol.</text:p>
      <text:h text:style-name="P8" text:outline-level="2"><text:bookmark-start text:name="alejandro-umaña-miranda"/>Alejandro Umaña<text:bookmark-end text:name="alejandro-umaña-miranda"/></text:h>
      <text:p text:style-name="P9">Revisar la gramática y corregir la ambigüedad entre llamada a mecanismo e invocación de protocolo fue mi tarea principal. Aprendí que una gramática EBNF no es solo un documento, sino el contrato entre el explorador y el parser. Si la gramática está mal, todo lo demás se resiente. También entendí por qué las gramáticas LL(1) son deseables.</text:p>
      <text:h text:style-name="P8" text:outline-level="2"><text:bookmark-start text:name="santiago-valverde-álvarez"/>Santiago Valverde<text:bookmark-end text:name="santiago-valverde-álvarez"/></text:h>
      <text:p text:style-name="P9">Mi enfoque fue en la integración del explorador con la especificación del lenguaje. Aprendí a distinguir entre errores léxicos, como un carácter inválido, y errores sintácticos, como una estructura incorrecta, y por qué el explorador solo debe encargarse de los primeros. También me familiaricé con la estructura de tokens y cómo se comunican entre módulos.</text:p>
      <text:h text:style-name="P8" text:outline-level="2"><text:bookmark-start text:name="daniel-zeas-brown"/>Daniel Zeas<text:bookmark-end text:name="daniel-zeas-brown"/></text:h>
      <text:p text:style-name="First_20_paragraph"><text:span text:style-name="T3">Trabajé en la organización del repositorio, el README y el formato de salida del explorador. Aprendí la importancia de tener una estructura clara desde el principio, con carpetas </text:span><text:span text:style-name="Source_20_Text"><text:span text:style-name="T3">src/</text:span></text:span><text:span text:style-name="T3">, </text:span><text:span text:style-name="Source_20_Text"><text:span text:style-name="T3">tests/</text:span></text:span><text:span text:style-name="T3"> y </text:span><text:span text:style-name="T4">ejemplos</text:span><text:span text:style-name="Source_20_Text"><text:span text:style-name="T3">/</text:span></text:span><text:span text:style-name="T3">, y de documentar cada función. También me tocó asegurar que el formato de los tokens coincidiera con lo que pide el proyecto.</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chapter">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chapter">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chapter">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Source_20_Text" style:display-name="Source Text" style:family="text">
      <style:text-properties style:font-name="Courier New" fo:font-family="'Courier New'" style:font-family-generic="modern" style:font-pitch="fixed" fo:language="zxx" fo:country="none"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4.2$Linux_X86_64 LibreOffice_project/580$Build-2</meta:generator>
    <dc:title/>
    <dc:description/>
    <dc:subject/>
    <meta:keyword/>
    <meta:initial-creator/>
    <meta:creation-date>2026-04-10T02:10:30Z</meta:creation-date>
    <dc:date>2026-05-05T22:57:11.631902887</dc:date>
    <meta:editing-duration>PT5M18S</meta:editing-duration>
    <meta:editing-cycles>3</meta:editing-cycles>
    <meta:document-statistic meta:table-count="0" meta:image-count="1" meta:object-count="0" meta:page-count="2" meta:paragraph-count="23" meta:word-count="375" meta:character-count="2480" meta:non-whitespace-character-count="2120"/>
  </office:meta>
</office:document-meta>
</file>